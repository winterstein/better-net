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36000000401F4D6DB97C5B3F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fo:padding="0.097cm" fo:border-left="0.5pt solid #000000" fo:border-right="none" fo:border-top="none" fo:border-bottom="non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2dd7dd"/>
    </style:style>
    <style:style style:name="P3" style:family="paragraph" style:parent-style-name="Heading_20_1">
      <style:text-properties officeooo:paragraph-rsid="0029e4e3"/>
    </style:style>
    <style:style style:name="P4" style:family="paragraph" style:parent-style-name="Heading_20_2">
      <style:paragraph-properties fo:text-align="center" style:justify-single-word="false"/>
      <style:text-properties officeooo:paragraph-rsid="0024ea07"/>
    </style:style>
    <style:style style:name="P5" style:family="paragraph" style:parent-style-name="Standard" style:list-style-name="L2"/>
    <style:style style:name="P6" style:family="paragraph" style:parent-style-name="Standard" style:list-style-name="L1">
      <style:text-properties officeooo:paragraph-rsid="0024ea07"/>
    </style:style>
    <style:style style:name="P7" style:family="paragraph" style:parent-style-name="Standard">
      <style:text-properties officeooo:rsid="002f8088" officeooo:paragraph-rsid="002f8088"/>
    </style:style>
    <style:style style:name="P8" style:family="paragraph" style:parent-style-name="Standard">
      <style:text-properties officeooo:paragraph-rsid="002f8088"/>
    </style:style>
    <style:style style:name="P9" style:family="paragraph" style:parent-style-name="Standard">
      <style:text-properties officeooo:rsid="00316679" officeooo:paragraph-rsid="00316679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29a55a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officeooo:rsid="002dd7dd" style:font-style-asian="normal" style:font-weight-asian="normal" style:font-style-complex="normal" style:font-weight-complex="normal"/>
    </style:style>
    <style:style style:name="T4" style:family="text">
      <style:text-properties officeooo:rsid="0024ea07"/>
    </style:style>
    <style:style style:name="T5" style:family="text">
      <style:text-properties officeooo:rsid="00271370"/>
    </style:style>
    <style:style style:name="T6" style:family="text">
      <style:text-properties officeooo:rsid="0028d4e9"/>
    </style:style>
    <style:style style:name="T7" style:family="text">
      <style:text-properties officeooo:rsid="0029a55a"/>
    </style:style>
    <style:style style:name="T8" style:family="text">
      <style:text-properties officeooo:rsid="0029e4e3"/>
    </style:style>
    <style:style style:name="T9" style:family="text">
      <style:text-properties officeooo:rsid="002be103"/>
    </style:style>
    <style:style style:name="T10" style:family="text">
      <style:text-properties officeooo:rsid="002f8088"/>
    </style:style>
    <style:style style:name="T11" style:family="text">
      <style:text-properties officeooo:rsid="003352f7"/>
    </style:style>
    <style:style style:name="T12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Better Net: Tackling Fake News and Manipulative AI<draw:frame draw:style-name="fr1" draw:name="Image1" text:anchor-type="char" svg:x="15.804cm" svg:y="-1.032cm" svg:width="1.903cm" svg:height="2.258cm" draw:z-index="0"><draw:image xlink:href="Pictures/1000000000000036000000401F4D6DB97C5B3F68.png" xlink:type="simple" xlink:show="embed" xlink:actuate="onLoad" draw:mime-type="image/png"/></draw:frame></text:h>
      <text:p text:style-name="Standard">Fake news, <text:span text:style-name="T5">fake profiles</text:span>, and misinformation campaigns are undermining trust, manipulating people, <text:span text:style-name="T5">and </text:span>distorting <text:span text:style-name="T5">debate and </text:span>democratic processes. This is happening now, and each AI advance amplifies it. <text:span text:style-name="T5">The c</text:span>atastrophe point <text:span text:style-name="T5">is</text:span> <text:span text:style-name="T5">w</text:span>hen elections are swayed by bot networks, or when toxic content overwhelms reasoned debate - crippling society from tackling global challenges <text:span text:style-name="T5">like </text:span>AI safety.</text:p>
      <text:h text:style-name="Heading_20_2" text:outline-level="2"><text:span text:style-name="T5">Proposal</text:span>: Your own AI to protect you online</text:h>
      <text:p text:style-name="Standard">Better Net <text:span text:style-name="T8">will be </text:span>like an ad-blocker for misinformation and manipulative content.</text:p>
      <text:p text:style-name="Standard">A browser extension / mobile browser that improves your quality of life online. Better Net gives <text:span text:style-name="Emphasis">nutrition-style labels</text:span> and gentle nudges – empowering users to stay informed and in control.</text:p>
      <text:p text:style-name="Standard">It checks for:</text:p>
      <text:list xml:id="list219168608" text:style-name="L2">
        <text:list-item>
          <text:p text:style-name="P5">Fake news, misinformation, and scams</text:p>
        </text:list-item>
        <text:list-item>
          <text:p text:style-name="P5">False reasoning and manipulative political content</text:p>
        </text:list-item>
        <text:list-item>
          <text:p text:style-name="P5">Bias and echo-chambers</text:p>
        </text:list-item>
      </text:list>
      <text:p text:style-name="Standard">The system <text:span text:style-name="T5">will use a</text:span> local <text:span text:style-name="T5">AI </text:span>agent <text:span text:style-name="T5">running </text:span>a small-LLM for private <text:span text:style-name="T5">low-cost </text:span>on-device analysi<text:span text:style-name="T5">s. This will be augmented by a</text:span>nonymous access to a shared knowledge base, which uses <text:span text:style-name="T5">larger </text:span>LLM<text:span text:style-name="T5">s </text:span>and trusted fact-check<text:span text:style-name="T9">ing</text:span> sources for authoritative analysis of common messag<text:span text:style-name="T5">ing</text:span>.</text:p>
      <text:p text:style-name="P9">Better Net will be open-source, non-partisan, <text:span text:style-name="T11">and non-prescriptive</text:span> – <text:span text:style-name="T11">For the user and hence society.</text:span></text:p>
      <text:h text:style-name="Heading_20_2" text:outline-level="2"><text:span text:style-name="Strong_20_Emphasis">Previous and related projects</text:span></text:h>
      <text:p text:style-name="Standard">Existing fact-checkers and media-bias monitors (e.g. Full Fact, Snopes, Media Bias/Fact Check) rel<text:span text:style-name="T9">ied</text:span> on <text:span text:style-name="T8">platform partnerships (which Facebook and others have now cut), or on </text:span>users <text:span text:style-name="T8">pro-actively checking news items - which fails on ease-of-use. They also struggle to scale, </text:span><text:span text:style-name="T9">using </text:span><text:span text:style-name="T8">manual checking of news, which can no longer cope with the flood of AI generated content</text:span>. <text:span text:style-name="T9">They</text:span><text:span text:style-name="T8"> don’t solve the problem, </text:span><text:span text:style-name="T9">though they do provide</text:span><text:span text:style-name="T8"> quality </text:span><text:span text:style-name="T9">work </text:span><text:span text:style-name="T8">that we can leverage.</text:span></text:p>
      <text:p text:style-name="Standard"><text:line-break/>Better Net <text:span text:style-name="T8">will take a user-centric approach: Designing around value for the user. Ease of use and automation will bring </text:span>safety and clarity to where people actually browse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4" text:outline-level="2">Team <text:span text:style-name="Strong_20_Emphasis">&amp; Experience</text:span></text:h>
            <text:p text:style-name="Standard"><text:span text:style-name="T6">A strong combination of e</text:span>xperience in<text:span text:style-name="T6"> the skills needed</text:span>: Commercial software products, <text:span text:style-name="T6">start-ups, b</text:span>rowser extensions, <text:span text:style-name="T6">and</text:span> AI media analysis.</text:p>
            <text:p text:style-name="Standard"/>
            <text:p text:style-name="P8"><text:span text:style-name="T10">Project Lead:</text:span> <text:a xlink:type="simple" xlink:href="https://www.linkedin.com/in/winterstein/" text:style-name="Internet_20_link" text:visited-style-name="Visited_20_Internet_20_Link">Daniel Winterstein</text:a>, PhD </text:p>
            <text:p text:style-name="P8"><text:span text:style-name="T10">Tech-e</text:span>ntrepreneur and AI <text:span text:style-name="T10">R&amp;D developer</text:span>. Founder of <text:span text:style-name="T6">tech-for-good company </text:span>Good-Loop (<text:span text:style-name="T6">$10m annual revenue</text:span>) and SoDash (AI social-media analytics).</text:p>
            <text:p text:style-name="P7">Backed by a skilled team with experience in product design, development, and marketing.</text:p>
          </table:table-cell>
          <table:table-cell table:style-name="Table1.B1" office:value-type="string">
            <text:h text:style-name="P4" text:outline-level="2"><text:span text:style-name="T6">6 Month </text:span>Plan</text:h>
            <text:list xml:id="list1971050633" text:style-name="L1">
              <text:list-item>
                <text:p text:style-name="P6">Website. Internal prototype using OpenAI for the LLM.</text:p>
              </text:list-item>
              <text:list-item>
                <text:p text:style-name="P6">Local LLM. Server for analytics, feedback, and sharing knowledge.</text:p>
              </text:list-item>
              <text:list-item>
                <text:p text:style-name="P6">Alpha release for friends &amp; family testing. Chrome, Edge, Firefox.</text:p>
              </text:list-item>
              <text:list-item>
                <text:p text:style-name="P6">Iterative development. <text:span text:style-name="T4">Safari support. </text:span>Mobile version via Lemur, <text:span text:style-name="T7">a </text:span>mobile browser with extension support.</text:p>
              </text:list-item>
              <text:list-item>
                <text:p text:style-name="P6">Public beta: <text:span text:style-name="T7">Engage with b</text:span>eachhead users: tech-savvy and concerned.</text:p>
              </text:list-item>
              <text:list-item>
                <text:p text:style-name="P6">Month 6: Launch version 1</text:p>
              </text:list-item>
            </text:list>
          </table:table-cell>
        </table:table-row>
      </table:table>
      <text:p text:style-name="Text_20_body"/>
      <text:p text:style-name="P2"><text:span text:style-name="Strong_20_Emphasis"><text:span text:style-name="T3">Contact: </text:span></text:span><text:a xlink:type="simple" xlink:href="mailto:daniel.winterstein@gmail.com" text:style-name="Internet_20_link" text:visited-style-name="Visited_20_Internet_20_Link"><text:span text:style-name="Strong_20_Emphasis"><text:span text:style-name="T3">daniel.winterstein@gmail.com</text:span></text:span></text:a></text:p>
      <text:p text:style-name="P2"><text:span text:style-name="Strong_20_Emphasis"><text:span text:style-name="T3"/></text:span></text:p>
      <text:p text:style-name="P1"><text:span text:style-name="Strong_20_Emphasis"><text:span text:style-name="T1">Better Net: </text:span></text:span><text:span text:style-name="Strong_20_Emphasis"><text:span text:style-name="T2">B</text:span></text:span><text:span text:style-name="Strong_20_Emphasis"><text:span text:style-name="T1">ecause the internet should empower, not manipulate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01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iel Winterstein</meta:initial-creator>
    <meta:creation-date>2025-10-19T16:15:45.251350141</meta:creation-date>
    <dc:date>2025-10-20T18:50:43.603134396</dc:date>
    <dc:creator>Daniel Winterstein</dc:creator>
    <meta:editing-duration>PT1H21M25S</meta:editing-duration>
    <meta:editing-cycles>15</meta:editing-cycles>
    <meta:generator>LibreOffice/7.3.7.2$Linux_X86_64 LibreOffice_project/30$Build-2</meta:generator>
    <meta:document-statistic meta:table-count="1" meta:image-count="1" meta:object-count="0" meta:page-count="1" meta:paragraph-count="28" meta:word-count="426" meta:character-count="2840" meta:non-whitespace-character-count="2447"/>
  </office:meta>
</office:document-meta>
</file>